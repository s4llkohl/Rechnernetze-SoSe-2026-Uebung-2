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ableColumn1" style:family="table-column">
      <style:table-column-properties style:column-width="3.4625in" style:rel-column-width="32767*"/>
    </style:style>
  </office:automatic-styles>
  <office:body>
    <office:text>
      <text:p text:style-name="P1">Nr1<text:line-break/>nd7hark3</text:p>
      <text:p text:style-name="P1">ra6rgv7h</text:p>
      <text:p text:style-name="P1"/>
      <text:p text:style-name="P1">Nr 2<text:line-break/>tracert 8.8.8.8</text:p>
      <text:p text:style-name="P1"/>
      <text:p text:style-name="P1">Routenverfolgung zu dns.google [8.8.8.8]</text:p>
      <text:p text:style-name="P1">über maximal 30 Hops:</text:p>
      <text:p text:style-name="P1"/>
      <text:p text:style-name="P1"><text:s text:c="2"/>1 <text:s text:c="3"/>&lt;1 ms <text:s text:c="3"/>&lt;1 ms <text:s text:c="3"/>&lt;1 ms <text:s/>fritz.box [192.168.2.1]</text:p>
      <text:p text:style-name="P1"><text:s text:c="2"/>2 <text:s text:c="4"/>* <text:s text:c="7"/>* <text:s text:c="7"/>* <text:s text:c="4"/>Zeitüberschreitung der Anforderung.</text:p>
      <text:p text:style-name="P1"><text:s text:c="2"/>3 <text:s text:c="4"/>9 ms <text:s text:c="4"/>9 ms <text:s text:c="4"/>9 ms <text:s/>92.79.244.158</text:p>
      <text:p text:style-name="P1"><text:s text:c="2"/>4 <text:s text:c="3"/>12 ms <text:s text:c="3"/>11 ms <text:s text:c="3"/>12 ms <text:s/>188.111.217.148</text:p>
      <text:p text:style-name="P1"><text:s text:c="2"/>5 <text:s text:c="3"/>14 ms <text:s text:c="3"/>13 ms <text:s text:c="3"/>15 ms <text:s/>92.79.214.118</text:p>
      <text:p text:style-name="P1"><text:s text:c="2"/>6 <text:s text:c="3"/>15 ms <text:s text:c="3"/>15 ms <text:s text:c="3"/>15 ms <text:s/>145.254.2.195</text:p>
      <text:p text:style-name="P1"><text:s text:c="2"/>7 <text:s text:c="3"/>16 ms <text:s text:c="3"/>16 ms <text:s text:c="3"/>16 ms <text:s/>74.125.48.122</text:p>
      <text:p text:style-name="P1"><text:s text:c="2"/>8 <text:s text:c="3"/>13 ms <text:s text:c="3"/>12 ms <text:s text:c="3"/>12 ms <text:s/>142.251.65.69</text:p>
      <text:p text:style-name="P1"><text:s text:c="2"/>9 <text:s text:c="3"/>13 ms <text:s text:c="3"/>13 ms <text:s text:c="3"/>13 ms <text:s/>172.253.66.137</text:p>
      <text:p text:style-name="P1"><text:s/>10 <text:s text:c="3"/>14 ms <text:s text:c="3"/>14 ms <text:s text:c="3"/>13 ms <text:s/>dns.google [8.8.8.8]</text:p>
      <text:p text:style-name="P1"/>
      <text:p text:style-name="P1">Ablaufverfolgung beendet.<text:line-break/><text:line-break/>Traceroute sendet ein Paket mit TTL=1. Der Router den es erreicht, zieht 1 ab. Da TTL nun 0 ist „stirbt“ es dort.</text:p>
      <text:p text:style-name="P1">Danach sendet es ein Paket mit TTL=2, der erste Router zieht 1 ab und der zweite Router zieht 1 ab, sodass nun dort TTL = 0. Somit wird, wenn ein Paket mit TTL=n gesendet wird, das Paket auch beim n-ten Router sterben. Dies passiert so oft bis der n-te Router das Ziel ist.<text:line-break/></text:p>
      <text:p text:style-name="P1">b)<text:line-break/></text:p>
      <text:p text:style-name="P1">tracert www.anu.edu.au</text:p>
      <text:p text:style-name="P1"/>
      <text:p text:style-name="P1">Routenverfolgung zu terra-web.anu.edu.au [130.56.67.33]</text:p>
      <text:p text:style-name="P1">über maximal 30 Hops:</text:p>
      <text:p text:style-name="P1"/>
      <text:p text:style-name="P1"><text:s text:c="2"/>1 <text:s text:c="3"/>&lt;1 ms <text:s text:c="3"/>&lt;1 ms <text:s text:c="3"/>&lt;1 ms <text:s/>fritz.box [192.168.2.1]</text:p>
      <text:p text:style-name="P1"><text:s text:c="2"/>2 <text:s text:c="4"/>* <text:s text:c="7"/>* <text:s text:c="7"/>* <text:s text:c="4"/>Zeitüberschreitung der Anforderung.</text:p>
      <text:p text:style-name="P1"><text:s text:c="2"/>3 <text:s text:c="3"/>11 ms <text:s text:c="3"/>11 ms <text:s text:c="3"/>11 ms <text:s/>188.111.160.230</text:p>
      <text:p text:style-name="P1"><text:s text:c="2"/>4 <text:s text:c="3"/>16 ms <text:s text:c="3"/>16 ms <text:s text:c="3"/>15 ms <text:s/>188.111.217.176</text:p>
      <text:p text:style-name="P1"><text:s text:c="2"/>5 <text:s text:c="3"/>17 ms <text:s text:c="3"/>17 ms <text:s text:c="3"/>18 ms <text:s/>92.79.214.176</text:p>
      <text:p text:style-name="P1"><text:s text:c="2"/>6 <text:s text:c="3"/>19 ms <text:s text:c="4"/>* <text:s text:c="6"/>18 ms <text:s/>145.254.2.209</text:p>
      <text:p text:style-name="P1"><text:s text:c="2"/>7 <text:s text:c="4"/>* <text:s text:c="7"/>* <text:s text:c="7"/>* <text:s text:c="4"/>Zeitüberschreitung der Anforderung.</text:p>
      <text:p text:style-name="P1"><text:s text:c="2"/>8 <text:s text:c="4"/>* <text:s text:c="7"/>* <text:s text:c="7"/>* <text:s text:c="4"/>Zeitüberschreitung der Anforderung.</text:p>
      <text:p text:style-name="P1"><text:s text:c="2"/>9 <text:s text:c="3"/>31 ms <text:s text:c="3"/>31 ms <text:s text:c="3"/>31 ms <text:s/>AARNET-PTY.ear4.London1.Level3.net [217.163.113.74]</text:p>
      <text:p text:style-name="P1"><text:s/>10 <text:s text:c="2"/>284 ms <text:s text:c="2"/>284 ms <text:s text:c="2"/>284 ms <text:s/>et-0-3-0.pe1.actn.act.aarnet.net.au [113.197.15.11]</text:p>
      <text:p text:style-name="P1"><text:s/>11 <text:s text:c="2"/>284 ms <text:s text:c="2"/>284 ms <text:s text:c="2"/>284 ms <text:s/>138.44.172.29</text:p>
      <text:p text:style-name="P1"><text:s/>12 <text:s text:c="2"/>286 ms <text:s text:c="2"/>285 ms <text:s text:c="2"/>285 ms <text:s/>vlan-2100-palo.anu.edu.au [150.203.201.33]</text:p>
      <text:p text:style-name="P1"><text:s/>13 <text:s text:c="2"/>286 ms <text:s text:c="2"/>285 ms <text:s text:c="2"/>286 ms <text:s/>tuckwell.anu.edu.au [130.56.67.33]</text:p>
      <text:p text:style-name="P1"/>
      <text:p text:style-name="P1">Ablaufverfolgung beendet.<text:line-break/></text:p>
      <text:p text:style-name="P1">c)<text:line-break/><text:line-break/>tracert 195.220.128.193</text:p>
      <text:p text:style-name="P1"/>
      <text:p text:style-name="P1">Routenverfolgung zu proxy-web.u-paris.fr [195.220.128.193]</text:p>
      <text:p text:style-name="P1">über maximal 30 Hops:</text:p>
      <text:p text:style-name="P1"/>
      <text:p text:style-name="P1"><text:s text:c="2"/>1 <text:s text:c="3"/>&lt;1 ms <text:s text:c="3"/>&lt;1 ms <text:s text:c="3"/>&lt;1 ms <text:s/>fritz.box [192.168.2.1]<text:tab/><text:tab/><text:tab/><text:tab/>(Trier, DE)</text:p>
      <text:p text:style-name="P1"><text:s text:c="2"/>2 <text:s text:c="4"/>* <text:s text:c="7"/>* <text:s text:c="7"/>* <text:s text:c="4"/>Zeitüberschreitung der Anforderung.</text:p>
      <text:p text:style-name="P1"><text:s text:c="2"/>3 <text:s text:c="3"/>10 ms <text:s text:c="3"/>10 ms <text:s text:c="3"/>10 ms <text:s/>188.111.160.230 <text:tab/><text:tab/><text:tab/><text:tab/><text:tab/>(Frankfurt, DE)</text:p>
      <text:p text:style-name="P1"><text:s text:c="2"/>4 <text:s text:c="3"/>12 ms <text:s text:c="3"/>12 ms <text:s text:c="3"/>12 ms <text:s/>188.111.217.172<text:tab/><text:tab/><text:tab/><text:tab/><text:tab/>(München, DE)</text:p>
      <text:p text:style-name="P1"><text:s text:c="2"/>5 <text:s text:c="3"/>16 ms <text:s text:c="3"/>16 ms <text:s text:c="3"/>17 ms <text:s/>92.79.214.114<text:tab/><text:tab/><text:tab/><text:tab/><text:tab/><text:tab/>(Hamburg, DE)</text:p>
      <text:p text:style-name="P1"><text:s text:c="2"/>6 <text:s text:c="4"/>* <text:s text:c="6"/>14 ms <text:s text:c="4"/>* <text:s text:c="4"/>145.254.2.207<text:tab/><text:tab/><text:tab/><text:tab/><text:tab/><text:tab/>(Hamburg, DE)</text:p>
      <text:p text:style-name="P1"><text:s text:c="2"/>7 <text:s text:c="3"/>13 ms <text:s text:c="3"/>13 ms <text:s text:c="3"/>13 ms <text:s/>fra-ix.geant.net [80.81.192.173]<text:tab/><text:tab/><text:tab/>(Frankfurt, DE)</text:p>
      <text:p text:style-name="P1"><text:s text:c="2"/>8 <text:s text:c="3"/>24 ms <text:s text:c="3"/>24 ms <text:s text:c="3"/>24 ms <text:s/>renater-ias-geant-gw.gen.ch.geant.net [83.97.89.13] (Camebridge, UK)</text:p>
      <text:p text:style-name="P1"><text:s text:c="2"/>9 <text:s text:c="3"/>26 ms <text:s text:c="3"/>25 ms <text:s text:c="3"/>29 ms <text:s/>renater-ias-renater-gw.gen.ch.geant.net [83.97.89.14] (Camebridge, UK)</text:p>
      <text:p text:style-name="P1"><text:s/>10 <text:s text:c="3"/>31 ms <text:s text:c="3"/>31 ms <text:s text:c="3"/>32 ms <text:s/>et-3-1-7-ren-nr-paris1-rtr-131.noc.renater.fr [193.51.180.166](Paris, FR)</text:p>
      <text:p text:style-name="P1"><text:s/>11 <text:s text:c="3"/>30 ms <text:s text:c="3"/>29 ms <text:s text:c="3"/>30 ms <text:s/>te0-0-0-12-ren-nr-odeon-rtr-091.noc.renater.fr [193.55.204.2](Paris, FR)</text:p>
      <text:p text:style-name="P1"><text:s/>12 <text:s text:c="3"/>31 ms <text:s text:c="3"/>31 ms <text:s text:c="3"/>29 ms <text:s/>xe-0-2-0-1-odeon-rtr-111-re0.noc.renater.fr [193.51.186.101](Paris, FR)</text:p>
      <text:p text:style-name="P1"><text:s/>13 <text:s text:c="3"/>30 ms <text:s text:c="3"/>31 ms <text:s text:c="3"/>30 ms <text:s/>195.221.127.6<text:tab/><text:tab/><text:tab/><text:tab/><text:tab/>(Paris, FR)</text:p>
      <text:p text:style-name="P1"><text:s/>14 <text:s text:c="3"/>37 ms <text:s text:c="3"/>30 ms <text:s text:c="3"/>30 ms <text:s/>195.220.129.174<text:tab/><text:tab/><text:tab/><text:tab/><text:tab/>(Paris, FR)</text:p>
      <text:p text:style-name="P1"><text:s/>15 <text:s text:c="4"/>* <text:s text:c="7"/>* <text:s text:c="7"/>* <text:s text:c="4"/>Zeitüberschreitung der Anforderung.</text:p>
      <text:p text:style-name="P1"><text:s/>16 <text:s text:c="4"/>* <text:s text:c="7"/>* <text:s text:c="7"/>* <text:s text:c="4"/>Zeitüberschreitung der Anforderung.</text:p>
      <text:p text:style-name="P1"><text:s/>17 <text:s text:c="4"/>* <text:s text:c="7"/>* <text:s text:c="7"/>* <text:s text:c="4"/>Zeitüberschreitung der Anforderung.</text:p>
      <text:p text:style-name="P1"><text:s/>18 <text:s text:c="4"/>* <text:s text:c="7"/>* <text:s text:c="7"/>* <text:s text:c="4"/>Zeitüberschreitung der Anforderung.</text:p>
      <text:p text:style-name="P1"><text:s/>19 <text:s text:c="4"/>* <text:s text:c="7"/>* <text:s text:c="7"/>* <text:s text:c="4"/>Zeitüberschreitung der Anforderung.</text:p>
      <text:p text:style-name="P1"><text:s/>20 <text:s text:c="4"/>* <text:s text:c="7"/>* <text:s text:c="7"/>* <text:s text:c="4"/>Zeitüberschreitung der Anforderung.</text:p>
      <text:p text:style-name="P1"><text:s/>21 <text:s text:c="4"/>* <text:s text:c="7"/>* <text:s text:c="7"/>* <text:s text:c="4"/>Zeitüberschreitung der Anforderung.</text:p>
      <text:p text:style-name="P1"><text:s/>22 <text:s text:c="4"/>* <text:s text:c="7"/>* <text:s text:c="7"/>* <text:s text:c="4"/>Zeitüberschreitung der Anforderung.</text:p>
      <text:p text:style-name="P1"><text:s/>23 <text:s text:c="4"/>* <text:s text:c="7"/>* <text:s text:c="7"/>* <text:s text:c="4"/>Zeitüberschreitung der Anforderung.</text:p>
      <text:p text:style-name="P1"><text:s/>24 <text:s text:c="4"/>* <text:s text:c="7"/>* <text:s text:c="7"/>* <text:s text:c="4"/>Zeitüberschreitung der Anforderung.</text:p>
      <text:p text:style-name="P1"><text:s/>25 <text:s text:c="4"/>* <text:s text:c="7"/>* <text:s text:c="7"/>* <text:s text:c="4"/>Zeitüberschreitung der Anforderung.</text:p>
      <text:p text:style-name="P1"><text:s/>26 <text:s text:c="4"/>* <text:s text:c="7"/>* <text:s text:c="7"/>* <text:s text:c="4"/>Zeitüberschreitung der Anforderung.</text:p>
      <text:p text:style-name="P1"><text:s/>27 <text:s text:c="4"/>* <text:s text:c="7"/>* <text:s text:c="7"/>* <text:s text:c="4"/>Zeitüberschreitung der Anforderung.</text:p>
      <text:p text:style-name="P1"><text:s/>28 <text:s text:c="4"/>* <text:s text:c="7"/>* <text:s text:c="7"/>* <text:s text:c="4"/>Zeitüberschreitung der Anforderung.</text:p>
      <text:p text:style-name="P1"><text:s/>29 <text:s text:c="4"/>* <text:s text:c="7"/>* <text:s text:c="7"/>* <text:s text:c="4"/>Zeitüberschreitung der Anforderung.</text:p>
      <text:p text:style-name="P1"><text:s/>30 <text:s text:c="4"/>* <text:s text:c="7"/>* <text:s text:c="7"/>* <text:s text:c="4"/>Zeitüberschreitung der Anforderung.</text:p>
      <text:p text:style-name="P1"/>
      <text:p text:style-name="P1">Ablaufverfolgung beendet.<text:line-break/><text:line-break/>Organisation: Université Paris Cité/RENATER</text:p>
      <text:p text:style-name="P1"/>
      <text:p text:style-name="P1">Nr3</text:p>
      <text:p text:style-name="P1"/>
      <text:p text:style-name="P1">Der TCP-Scan ist wesentlich schneller als der UDP-Scan. Ursache dafür ist das TCP einen Drei-Wege-Handschlag nutzt. Hierbei antworten geschlossene Ports sofort mit einem RST-Paket und offene mit SYN-ACK. Das Zielsystem antwortet aktiv und ohne künstliche Verzögerung. UDP hingegen ist verbindungslos. Offene Ports antworten oft garnicht und geschlossene antworten mit „ICMP Port Unreachable“. Moderne Betriebssysteme begrenzen diese Antworten jedoch stark(z. B. Max 1 pro Sekunde). Name muss daher künstliche Pausen einlegen.</text:p>
      <text:p text:style-name="P1">Möglichkeit den Prozess zu beschleunigen ist indem nur die wichtigsten/spezifische Ports gescannt werden, ein aggressiveres Timing zu wählen(T4 anstatt dem standardmäßig eingestelltem T3) oder die Wiederholungsversuche zu minimieren.</text:p>
      <text:p text:style-name="P1"/>
      <text:p text:style-name="P1"/>
      <text:p text:style-name="P1">Nr4</text:p>
      <text:p text:style-name="P1"/>
      <text:p text:style-name="P1">1. Tiemout einrichten: Der Sockel muss nach einer bestimmten Zeit das Warten abbrechen.</text:p>
      <text:p text:style-name="P1">2. den nächsten Lebenden Knoten finden: Schlägt das Senden fehl, nehmen wir den nächsten Knoten aus der Liste und versuchen es d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7</meta:generator>
  </office:meta>
</office:document-meta>
</file>